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8000002B1DDED59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2cd3" officeooo:paragraph-rsid="000f2cd3"/>
    </style:style>
    <style:style style:name="P2" style:family="paragraph" style:parent-style-name="Text_20_body">
      <style:text-properties officeooo:rsid="000f2cd3" officeooo:paragraph-rsid="000f2cd3"/>
    </style:style>
    <style:style style:name="P3" style:family="paragraph" style:parent-style-name="Text_20_body" style:list-style-name="L1">
      <style:text-properties officeooo:rsid="000f2cd3" officeooo:paragraph-rsid="000f2cd3"/>
    </style:style>
    <style:style style:name="P4" style:family="paragraph" style:parent-style-name="Text_20_body">
      <style:text-properties fo:color="#00a933" loext:opacity="100%" fo:font-weight="bold" officeooo:rsid="000f2cd3" officeooo:paragraph-rsid="000f2cd3" style:font-weight-asian="bold" style:font-weight-complex="bold"/>
    </style:style>
    <style:style style:name="P5" style:family="paragraph" style:parent-style-name="Text_20_body">
      <style:text-properties fo:color="#ff0000" loext:opacity="100%" fo:font-style="italic" fo:font-weight="normal" officeooo:rsid="000fd77c" officeooo:paragraph-rsid="000fd77c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color="#2a6099" loext:opacity="100%" fo:font-style="normal" style:text-underline-style="solid" style:text-underline-width="auto" style:text-underline-color="font-color" fo:font-weight="normal" officeooo:rsid="000fd77c" officeooo:paragraph-rsid="000fd77c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officeooo:rsid="000f2cd3" officeooo:paragraph-rsid="000f2cd3"/>
    </style:style>
    <style:style style:name="T1" style:family="text">
      <style:text-properties officeooo:rsid="000f2cd3"/>
    </style:style>
    <style:style style:name="T2" style:family="text">
      <style:text-properties officeooo:rsid="0011acb0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as ist ein Test für den ODT <text:s/>Parser – <text:span text:style-name="T1">Heading </text:span><text:span text:style-name="T2">3</text:span></text:h>
      <text:p text:style-name="P1"/>
      <text:h text:style-name="Heading_20_4" text:outline-level="4">Import von sehr einfachen ODT Templates – <text:span text:style-name="T1">Heading </text:span></text:h>
      <text:p text:style-name="Text_20_body"/>
      <text:p text:style-name="P2">Und dann natürlich default Textbody.</text:p>
      <text:p text:style-name="P2"/>
      <text:list text:style-name="L1">
        <text:list-item>
          <text:p text:style-name="P3">Aufzählung1</text:p>
        </text:list-item>
        <text:list-item>
          <text:p text:style-name="P3">Aufzählung2</text:p>
        </text:list-item>
        <text:list-item>
          <text:p text:style-name="P3">Aufzählung3</text:p>
        </text:list-item>
      </text:list>
      <text:p text:style-name="P2"/>
      <text:p text:style-name="P4">Grüner Text Fett</text:p>
      <text:p text:style-name="P5">Roter Text Kursiv</text:p>
      <text:p text:style-name="P6">Blauer Text Unterstriche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Tabelle 1</text:p>
          </table:table-cell>
          <table:table-cell table:style-name="Table1.A1" office:value-type="string">
            <text:p text:style-name="P7">2</text:p>
          </table:table-cell>
          <table:table-cell table:style-name="Table1.C1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C2" office:value-type="string">
            <text:p text:style-name="P7">6</text:p>
          </table:table-cell>
        </table:table-row>
      </table:table>
      <text:p text:style-name="P1"/>
      <text:p text:style-name="P1">Bild</text:p>
      <text:p text:style-name="P1"/>
      <text:p text:style-name="P1"><draw:frame draw:style-name="fr1" draw:name="Image1" text:anchor-type="char" svg:width="2.528in" svg:height="1.8602in" draw:z-index="0"><draw:image xlink:href="Pictures/10000001000003A8000002B1DDED59B2.png" xlink:type="simple" xlink:show="embed" xlink:actuate="onLoad" draw:mime-type="image/png"/></draw:frame>Text neben dem Bild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9:58:36.258643801</meta:creation-date>
    <dc:date>2026-05-11T20:16:46.648865056</dc:date>
    <meta:editing-duration>PT18M8S</meta:editing-duration>
    <meta:editing-cycles>5</meta:editing-cycles>
    <meta:generator>LibreOffice/26.2.3.2$Linux_X86_64 LibreOffice_project/620$Build-2</meta:generator>
    <meta:document-statistic meta:table-count="1" meta:image-count="1" meta:object-count="0" meta:page-count="1" meta:paragraph-count="17" meta:word-count="49" meta:character-count="265" meta:non-whitespace-character-count="232"/>
  </office:meta>
</office:document-meta>
</file>